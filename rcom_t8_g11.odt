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F0000028C698A371BF3C54F45.png" manifest:media-type="image/png"/>
  <manifest:file-entry manifest:full-path="Pictures/1000000000000306000001CC722C6B9074043111.png" manifest:media-type="image/png"/>
  <manifest:file-entry manifest:full-path="Pictures/10000000000002FB00000253F1F3744B6524C103.png" manifest:media-type="image/png"/>
  <manifest:file-entry manifest:full-path="Pictures/100000010000007E0000008B7B527FA914FD71A6.png" manifest:media-type="image/png"/>
  <manifest:file-entry manifest:full-path="Pictures/100000000000021300000236B5B2D2823A19740C.png" manifest:media-type="image/png"/>
  <manifest:file-entry manifest:full-path="Pictures/10000001000000DC00000088B2265EE126727404.png" manifest:media-type="image/png"/>
  <manifest:file-entry manifest:full-path="Pictures/10000001000001B6000000AB36852E16CB0C1DB5.png" manifest:media-type="image/png"/>
  <manifest:file-entry manifest:full-path="Pictures/10000001000005EA000003449D382B8D17B33B4F.png" manifest:media-type="image/png"/>
  <manifest:file-entry manifest:full-path="Pictures/1000000000000247000000B1CF706E3EC70F4A63.png" manifest:media-type="image/png"/>
  <manifest:file-entry manifest:full-path="Pictures/10000001000000DC00000086E32B014A66AF53D6.png" manifest:media-type="image/png"/>
  <manifest:file-entry manifest:full-path="Pictures/10000001000001D8000000B7C98209A3A5336FAC.png" manifest:media-type="image/png"/>
  <manifest:file-entry manifest:full-path="Pictures/1000000100000280000000D3CDAA02D902129DD3.png" manifest:media-type="image/png"/>
  <manifest:file-entry manifest:full-path="Pictures/100000000000034700000296D5A30477BF632774.png" manifest:media-type="image/png"/>
  <manifest:file-entry manifest:full-path="Pictures/10000001000006120000024B79CCEAA8FD46353B.png" manifest:media-type="image/png"/>
  <manifest:file-entry manifest:full-path="Pictures/10000000000002E40000022F67F0B4CA13A827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list-style-name="WWNum2">
      <style:paragraph-properties fo:margin-left="0.25in" fo:margin-right="0in" fo:margin-top="0.1945in" fo:margin-bottom="0.1945in" style:contextual-spacing="false" fo:text-indent="-0.25in" style:auto-text-indent="false"/>
    </style:style>
    <style:style style:name="P2" style:family="paragraph" style:parent-style-name="Heading_20_1" style:list-style-name="WWNum2">
      <style:paragraph-properties fo:margin-left="0in" fo:margin-right="0in" fo:margin-top="0.1945in" fo:margin-bottom="0.1945in" style:contextual-spacing="false" fo:text-indent="0in" style:auto-text-indent="false" fo:break-before="page">
        <style:tab-stops>
          <style:tab-stop style:position="0.25in"/>
        </style:tab-stops>
      </style:paragraph-properties>
    </style:style>
    <style:style style:name="P3" style:family="paragraph" style:parent-style-name="Heading_20_1" style:list-style-name="WWNum2">
      <style:paragraph-properties fo:margin-left="0in" fo:margin-right="0in" fo:margin-top="0.1945in" fo:margin-bottom="0.1945in" style:contextual-spacing="false" fo:text-indent="0in" style:auto-text-indent="false">
        <style:tab-stops>
          <style:tab-stop style:position="0.25in"/>
        </style:tab-stops>
      </style:paragraph-properties>
    </style:style>
    <style:style style:name="P4" style:family="paragraph" style:parent-style-name="Heading_20_1">
      <loext:graphic-properties draw:fill="solid" draw:fill-color="#ffffff"/>
      <style:paragraph-properties fo:margin-top="0.1945in" fo:margin-bottom="0.1945in" style:contextual-spacing="false" fo:background-color="#ffffff"/>
    </style:style>
    <style:style style:name="P5" style:family="paragraph" style:parent-style-name="Heading_20_1">
      <style:paragraph-properties fo:margin-top="0.1945in" fo:margin-bottom="0.1945in" style:contextual-spacing="false"/>
    </style:style>
    <style:style style:name="P6" style:family="paragraph" style:parent-style-name="Heading_20_1">
      <style:paragraph-properties fo:margin-top="0.1945in" fo:margin-bottom="0.1945in" style:contextual-spacing="false"/>
      <style:text-properties style:font-name="Arial" fo:font-size="11pt" fo:font-weight="normal" style:font-size-asian="11pt" style:font-weight-asian="normal" style:font-name-complex="Arial2" style:font-size-complex="11pt" style:font-weight-complex="normal"/>
    </style:style>
    <style:style style:name="P7" style:family="paragraph" style:parent-style-name="Heading_20_1" style:list-style-name="WWNum2">
      <style:paragraph-properties fo:margin-left="0.25in" fo:margin-right="0in" fo:margin-top="0.1945in" fo:margin-bottom="0.1945in" style:contextual-spacing="false" fo:line-height="115%" fo:text-align="justify" style:justify-single-word="false" fo:text-indent="-0.25in" style:auto-text-indent="false"/>
    </style:style>
    <style:style style:name="P8" style:family="paragraph" style:parent-style-name="Heading_20_1">
      <style:paragraph-properties fo:margin-top="0.1945in" fo:margin-bottom="0.1945in" style:contextual-spacing="false" fo:line-height="115%" fo:text-align="justify" style:justify-single-word="false"/>
    </style:style>
    <style:style style:name="P9" style:family="paragraph" style:parent-style-name="List_20_Paragraph" style:list-style-name="WWNum7">
      <loext:graphic-properties draw:fill="solid" draw:fill-color="#ffffff"/>
      <style:paragraph-properties fo:margin-top="0in" fo:margin-bottom="0in" style:contextual-spacing="true" fo:line-height="115%" fo:background-color="#ffffff" style:vertical-align="baseline"/>
    </style:style>
    <style:style style:name="P10" style:family="paragraph" style:parent-style-name="List_20_Paragraph" style:list-style-name="WWNum5">
      <loext:graphic-properties draw:fill="solid" draw:fill-color="#ffffff"/>
      <style:paragraph-properties fo:margin-top="0in" fo:margin-bottom="0in" style:contextual-spacing="true" fo:line-height="115%" fo:background-color="#ffffff" style:vertical-align="baseline"/>
    </style:style>
    <style:style style:name="P11" style:family="paragraph" style:parent-style-name="List_20_Paragraph">
      <loext:graphic-properties draw:fill="solid" draw:fill-color="#ffffff"/>
      <style:paragraph-properties fo:margin-left="0.25in" fo:margin-right="0in" fo:margin-top="0in" fo:margin-bottom="0.1665in" style:contextual-spacing="true" fo:line-height="115%" fo:text-align="justify" style:justify-single-word="false" fo:text-indent="0in" style:auto-text-indent="false" fo:background-color="#ffffff" style:vertical-align="baseline"/>
    </style:style>
    <style:style style:name="P12" style:family="paragraph" style:parent-style-name="List_20_Paragraph" style:list-style-name="WWNum5">
      <loext:graphic-properties draw:fill="solid" draw:fill-color="#ffffff"/>
      <style:paragraph-properties fo:margin-top="0in" fo:margin-bottom="0.1665in" style:contextual-spacing="true" fo:line-height="115%" fo:text-align="justify" style:justify-single-word="false" fo:background-color="#ffffff" style:vertical-align="baseline"/>
    </style:style>
    <style:style style:name="P13" style:family="paragraph" style:parent-style-name="List_20_Paragraph" style:list-style-name="WWNum10">
      <style:paragraph-properties fo:margin-top="0.1665in" fo:margin-bottom="0in" style:contextual-spacing="true" fo:line-height="115%" fo:text-align="justify" style:justify-single-word="false" style:vertical-align="baseline"/>
    </style:style>
    <style:style style:name="P14" style:family="paragraph" style:parent-style-name="List_20_Paragraph" style:list-style-name="WWNum11">
      <style:paragraph-properties fo:margin-top="0.1665in" fo:margin-bottom="0in" style:contextual-spacing="true" fo:line-height="115%" fo:text-align="justify" style:justify-single-word="false" style:vertical-align="baseline"/>
    </style:style>
    <style:style style:name="P15" style:family="paragraph" style:parent-style-name="List_20_Paragraph" style:list-style-name="WWNum13">
      <style:paragraph-properties fo:margin-top="0.1665in" fo:margin-bottom="0in" style:contextual-spacing="true" fo:line-height="115%" fo:text-align="justify" style:justify-single-word="false"/>
    </style:style>
    <style:style style:name="P16" style:family="paragraph" style:parent-style-name="List_20_Paragraph" style:list-style-name="WWNum6">
      <loext:graphic-properties draw:fill="solid" draw:fill-color="#ffffff"/>
      <style:paragraph-properties fo:margin-top="0in" fo:margin-bottom="0in" style:contextual-spacing="true" fo:line-height="115%" fo:background-color="#ffffff" style:vertical-align="baseline"/>
    </style:style>
    <style:style style:name="P17" style:family="paragraph" style:parent-style-name="List_20_Paragraph" style:list-style-name="WWNum9">
      <style:paragraph-properties fo:margin-left="0.25in" fo:margin-right="0in" fo:margin-top="0in" fo:margin-bottom="0in" style:contextual-spacing="true" fo:line-height="115%" fo:text-indent="-0.25in" style:auto-text-indent="false"/>
    </style:style>
    <style:style style:name="P18" style:family="paragraph" style:parent-style-name="List_20_Paragraph" style:list-style-name="WWNum12">
      <style:paragraph-properties fo:margin-top="0in" fo:margin-bottom="0in" style:contextual-spacing="true" fo:line-height="115%"/>
    </style:style>
    <style:style style:name="P19" style:family="paragraph" style:parent-style-name="Normal_20__28_Web_29_">
      <style:paragraph-properties fo:margin-top="0.1945in" fo:margin-bottom="0.1945in" style:contextual-spacing="false"/>
    </style:style>
    <style:style style:name="P20" style:family="paragraph" style:parent-style-name="Normal_20__28_Web_29_">
      <style:paragraph-properties fo:margin-top="0.1945in" fo:margin-bottom="0.1945in" style:contextual-spacing="false"/>
      <style:text-properties style:font-name="ArialMT" fo:font-size="11pt" style:font-size-asian="11pt" style:font-size-complex="11pt"/>
    </style:style>
    <style:style style:name="P21" style:family="paragraph" style:parent-style-name="Normal_20__28_Web_29_" style:list-style-name="WWNum9">
      <style:paragraph-properties fo:margin-top="0.1665in" fo:margin-bottom="0.1665in" style:contextual-spacing="false" fo:line-height="115%" fo:text-align="justify" style:justify-single-word="false"/>
    </style:style>
    <style:style style:name="P22" style:family="paragraph" style:parent-style-name="Normal_20__28_Web_29_" style:list-style-name="WWNum9">
      <style:paragraph-properties fo:margin-left="0.25in" fo:margin-right="0in" fo:margin-top="0.1665in" fo:margin-bottom="0in" style:contextual-spacing="false" fo:line-height="115%" fo:text-align="justify" style:justify-single-word="false" fo:text-indent="-0.25in" style:auto-text-indent="false" style:vertical-align="baseline"/>
    </style:style>
    <style:style style:name="P23" style:family="paragraph" style:parent-style-name="Normal_20__28_Web_29_">
      <style:paragraph-properties fo:margin-top="0.1665in" fo:margin-bottom="0.1665in" style:contextual-spacing="false" fo:line-height="115%" fo:text-align="justify" style:justify-single-word="false"/>
    </style:style>
    <style:style style:name="P24" style:family="paragraph" style:parent-style-name="Normal_20__28_Web_29_">
      <style:paragraph-properties fo:margin-left="0in" fo:margin-right="0in" fo:margin-top="0.1665in" fo:margin-bottom="0in" style:contextual-spacing="false" fo:line-height="115%" fo:text-align="justify" style:justify-single-word="false" fo:text-indent="0.1972in" style:auto-text-indent="false"/>
    </style:style>
    <style:style style:name="P25" style:family="paragraph" style:parent-style-name="Normal_20__28_Web_29_">
      <style:paragraph-properties fo:margin-top="0.1665in" fo:margin-bottom="0in" style:contextual-spacing="false" fo:line-height="115%" fo:text-align="justify" style:justify-single-word="false"/>
    </style:style>
    <style:style style:name="P26" style:family="paragraph" style:parent-style-name="Normal_20__28_Web_29_">
      <style:paragraph-properties fo:margin-top="0in" fo:margin-bottom="0in" style:contextual-spacing="false" fo:line-height="115%" fo:text-align="justify" style:justify-single-word="false"/>
    </style:style>
    <style:style style:name="P27" style:family="paragraph" style:parent-style-name="Normal_20__28_Web_29_">
      <style:paragraph-properties fo:margin-top="0in" fo:margin-bottom="0in" style:contextual-spacing="false" fo:line-height="115%" fo:text-align="justify" style:justify-single-word="false"/>
      <style:text-properties officeooo:paragraph-rsid="000e1f5a"/>
    </style:style>
    <style:style style:name="P28" style:family="paragraph" style:parent-style-name="Normal_20__28_Web_29_">
      <style:paragraph-properties fo:margin-top="0in" fo:margin-bottom="0in" style:contextual-spacing="false" fo:line-height="115%" fo:text-align="justify" style:justify-single-word="false"/>
      <style:text-properties fo:color="#000000" loext:opacity="100%" style:font-name="Arial" fo:font-size="11pt" style:font-size-asian="11pt" style:font-name-complex="Arial2" style:font-size-complex="11pt"/>
    </style:style>
    <style:style style:name="P29" style:family="paragraph" style:parent-style-name="Normal_20__28_Web_29_">
      <style:paragraph-properties fo:margin-top="0in" fo:margin-bottom="0in" style:contextual-spacing="false" fo:line-height="115%" fo:text-align="justify" style:justify-single-word="false"/>
      <style:text-properties style:font-name="Arial" fo:font-size="11pt" style:font-size-asian="11pt" style:font-name-complex="Arial2" style:font-size-complex="11pt"/>
    </style:style>
    <style:style style:name="P30" style:family="paragraph" style:parent-style-name="Normal_20__28_Web_29_">
      <style:paragraph-properties fo:margin-top="0in" fo:margin-bottom="0in" style:contextual-spacing="false" fo:line-height="115%" fo:text-align="justify" style:justify-single-word="false"/>
      <style:text-properties style:font-name="Arial" fo:font-size="11pt" fo:language="en" fo:country="US" style:font-size-asian="11pt" style:font-name-complex="Arial2" style:font-size-complex="11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style:font-name="Arial" fo:font-size="14pt" style:font-size-asian="14pt" style:font-name-complex="Arial2" style:font-size-complex="14pt"/>
    </style:style>
    <style:style style:name="P33"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text-properties style:font-name="Arial" style:font-name-complex="Arial2"/>
    </style:style>
    <style:style style:name="P34"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 style:family="paragraph" style:parent-style-name="Standard">
      <style:paragraph-properties fo:margin-top="0.1945in" fo:margin-bottom="0.1945in" style:contextual-spacing="false" fo:line-height="100%"/>
    </style:style>
    <style:style style:name="P36" style:family="paragraph" style:parent-style-name="Standard">
      <loext:graphic-properties draw:fill="solid" draw:fill-color="#ffffff"/>
      <style:paragraph-properties fo:margin-left="0in" fo:margin-right="0in" fo:margin-top="0in" fo:margin-bottom="0in" style:contextual-spacing="false" fo:line-height="115%" fo:text-indent="0.1972in" style:auto-text-indent="false" fo:background-color="#ffffff" style:vertical-align="baseline"/>
    </style:style>
    <style:style style:name="P37"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style>
    <style:style style:name="P38" style:family="paragraph" style:parent-style-name="Standard">
      <style:paragraph-properties fo:margin-top="0.1665in" fo:margin-bottom="0.111in" style:contextual-spacing="false" fo:line-height="115%" fo:text-align="justify" style:justify-single-word="false"/>
    </style:style>
    <style:style style:name="P39" style:family="paragraph" style:parent-style-name="Standard">
      <style:paragraph-properties fo:margin-left="0in" fo:margin-right="0in" fo:margin-top="0.1665in" fo:margin-bottom="0in" style:contextual-spacing="false" fo:line-height="115%" fo:text-align="justify" style:justify-single-word="false" fo:text-indent="0.1972in" style:auto-text-indent="false"/>
    </style:style>
    <style:style style:name="P40" style:family="paragraph" style:parent-style-name="Standard">
      <style:paragraph-properties fo:margin-top="0.1665in" fo:margin-bottom="0.111in" style:contextual-spacing="false" fo:line-height="115%" fo:text-align="justify" style:justify-single-word="false"/>
      <style:text-properties officeooo:paragraph-rsid="000f91c9"/>
    </style:style>
    <style:style style:name="P41" style:family="paragraph" style:parent-style-name="Standard">
      <style:paragraph-properties fo:margin-top="0in" fo:margin-bottom="0in" style:contextual-spacing="false" fo:line-height="115%"/>
    </style:style>
    <style:style style:name="P42" style:family="paragraph" style:parent-style-name="Standard">
      <style:paragraph-properties fo:margin-top="0in" fo:margin-bottom="0in" style:contextual-spacing="false" fo:line-height="115%"/>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43" style:family="paragraph" style:parent-style-name="Standard">
      <style:paragraph-properties fo:margin-top="0.1665in" fo:margin-bottom="0in" style:contextual-spacing="false" fo:line-height="115%"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44" style:family="paragraph" style:parent-style-name="Standard">
      <style:text-properties officeooo:paragraph-rsid="000f91c9"/>
    </style:style>
    <style:style style:name="P45" style:family="paragraph" style:parent-style-name="Standard">
      <style:paragraph-properties fo:margin-top="0.1665in" fo:margin-bottom="0.111in" style:contextual-spacing="false" fo:line-height="115%" fo:text-align="justify" style:justify-single-word="false"/>
      <style:text-properties officeooo:rsid="000f91c9" officeooo:paragraph-rsid="000f91c9"/>
    </style:style>
    <style:style style:name="P46" style:family="paragraph" style:parent-style-name="Standard">
      <style:paragraph-properties fo:margin-top="0.1665in" fo:margin-bottom="0.111in" style:contextual-spacing="false" fo:line-height="115%" fo:text-align="justify" style:justify-single-word="false"/>
      <style:text-properties style:font-name="Arial1" officeooo:paragraph-rsid="000f91c9"/>
    </style:style>
    <style:style style:name="P47"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0f91c9" officeooo:paragraph-rsid="000f91c9" style:font-size-asian="16pt" style:font-weight-asian="bold" style:font-size-complex="16pt" style:font-weight-complex="bold"/>
    </style:style>
    <style:style style:name="P48" style:family="paragraph" style:parent-style-name="Text_20_body">
      <style:paragraph-properties fo:margin-top="0.1665in" fo:margin-bottom="0in" style:contextual-spacing="false" fo:line-height="115%" fo:text-align="justify" style:justify-single-word="false"/>
    </style:style>
    <style:style style:name="P49" style:family="paragraph" style:parent-style-name="Text_20_body">
      <style:paragraph-properties fo:margin-top="0.1665in" fo:margin-bottom="0.111in" style:contextual-spacing="false" fo:line-height="115%" fo:text-align="justify" style:justify-single-word="false"/>
      <style:text-properties officeooo:paragraph-rsid="000f91c9"/>
    </style:style>
    <style:style style:name="P50" style:family="paragraph" style:parent-style-name="Text_20_body">
      <style:text-properties style:font-name="Arial1"/>
    </style:style>
    <style:style style:name="P51" style:family="paragraph" style:parent-style-name="Text_20_body">
      <style:paragraph-properties fo:margin-top="0.1665in" fo:margin-bottom="0.111in" style:contextual-spacing="false" fo:line-height="115%" fo:text-align="justify" style:justify-single-word="false"/>
      <style:text-properties fo:font-size="16pt" fo:font-weight="bold" officeooo:rsid="000f91c9" officeooo:paragraph-rsid="000f91c9" style:font-size-asian="16pt" style:font-weight-asian="bold" style:font-size-complex="16pt" style:font-weight-complex="bold"/>
    </style:style>
    <style:style style:name="T1" style:family="text">
      <style:text-properties style:font-name="Arial" fo:font-size="26pt" fo:font-weight="bold" style:font-size-asian="26pt" style:font-weight-asian="bold" style:font-name-complex="Arial2" style:font-size-complex="26pt" style:font-weight-complex="bold"/>
    </style:style>
    <style:style style:name="T2" style:family="text">
      <style:text-properties style:font-name="Arial" fo:font-size="20pt" style:font-size-asian="20pt" style:font-name-complex="Arial2" style:font-size-complex="20pt"/>
    </style:style>
    <style:style style:name="T3" style:family="text">
      <style:text-properties style:font-name="Arial" fo:font-size="14pt" style:font-size-asian="14pt" style:font-name-complex="Arial2" style:font-size-complex="14pt"/>
    </style:style>
    <style:style style:name="T4" style:family="text">
      <style:text-properties style:font-name="Arial" fo:font-size="14pt" style:font-size-asian="14pt" style:language-asian="pt" style:country-asian="PT" style:font-name-complex="Arial2" style:font-size-complex="14pt"/>
    </style:style>
    <style:style style:name="T5" style:family="text">
      <style:text-properties style:font-name="Arial" fo:font-size="14pt" fo:font-weight="bold" style:font-size-asian="14pt" style:font-weight-asian="bold" style:font-name-complex="Arial2" style:font-size-complex="14pt" style:font-weight-complex="bold"/>
    </style:style>
    <style:style style:name="T6" style:family="text">
      <style:text-properties style:font-name="Arial" fo:font-size="14pt" fo:background-color="#ffffff" loext:char-shading-value="0" style:font-size-asian="14pt" style:font-name-complex="Arial2" style:font-size-complex="14pt"/>
    </style:style>
    <style:style style:name="T7" style:family="text">
      <style:text-properties style:font-name="Arial" fo:font-size="16pt" style:font-size-asian="16pt" style:font-name-complex="Arial2" style:font-size-complex="16pt"/>
    </style:style>
    <style:style style:name="T8" style:family="text">
      <style:text-properties style:font-name="Arial" fo:font-size="16pt" fo:font-style="italic" style:font-size-asian="16pt" style:font-style-asian="italic" style:font-name-complex="Arial2" style:font-size-complex="16pt" style:font-style-complex="italic"/>
    </style:style>
    <style:style style:name="T9" style:family="text">
      <style:text-properties style:font-name="Arial" fo:font-size="11pt" fo:font-weight="normal" style:font-size-asian="11pt" style:font-weight-asian="normal" style:font-name-complex="Arial2" style:font-size-complex="11pt" style:font-weight-complex="normal"/>
    </style:style>
    <style:style style:name="T10" style:family="text">
      <style:text-properties style:font-name="Arial" fo:font-size="11pt" fo:font-weight="normal" style:letter-kerning="false" style:font-name-asian="Calibri1" style:font-size-asian="11pt" style:language-asian="en" style:country-asian="US" style:font-weight-asian="normal" style:font-name-complex="Arial2" style:font-size-complex="11pt" style:font-weight-complex="normal"/>
    </style:style>
    <style:style style:name="T11" style:family="text">
      <style:text-properties style:font-name="Arial" fo:font-size="11pt" fo:font-style="italic" fo:font-weight="normal" style:font-size-asian="11pt" style:font-style-asian="italic" style:font-weight-asian="normal" style:font-name-complex="Arial2" style:font-size-complex="11pt" style:font-style-complex="italic" style:font-weight-complex="normal"/>
    </style:style>
    <style:style style:name="T12" style:family="text">
      <style:text-properties style:font-name="Arial" fo:font-size="11pt" style:font-size-asian="11pt" style:font-name-complex="Arial2" style:font-size-complex="11pt"/>
    </style:style>
    <style:style style:name="T13" style:family="text">
      <style:text-properties style:font-name="Arial" fo:font-size="11pt" fo:language="en" fo:country="US" style:font-size-asian="11pt" style:font-name-complex="Arial2" style:font-size-complex="11pt"/>
    </style:style>
    <style:style style:name="T14" style:family="text">
      <style:text-properties style:font-name="Arial" fo:font-size="15pt" style:font-size-asian="15pt" style:font-name-complex="Arial2" style:font-size-complex="15pt"/>
    </style:style>
    <style:style style:name="T15" style:family="text">
      <style:text-properties style:font-name="Arial" style:font-name-complex="Arial2"/>
    </style:style>
    <style:style style:name="T16" style:family="text">
      <style:text-properties style:font-name="Arial" fo:font-style="italic" style:font-style-asian="italic" style:font-name-complex="Arial2" style:font-style-complex="italic"/>
    </style:style>
    <style:style style:name="T17" style:family="text">
      <style:text-properties fo:color="#b3321c" loext:opacity="100%" style:font-name="Arial" fo:font-size="14pt" fo:font-weight="bold" style:font-size-asian="14pt" style:font-weight-asian="bold" style:font-name-complex="Arial2" style:font-size-complex="14pt" style:font-weight-complex="bold"/>
    </style:style>
    <style:style style:name="T18" style:family="text">
      <style:text-properties fo:color="#b3321c" loext:opacity="100%" style:font-name="Arial" fo:font-size="14pt" style:font-size-asian="14pt" style:font-name-complex="Arial2" style:font-size-complex="14pt"/>
    </style:style>
    <style:style style:name="T19" style:family="text">
      <style:text-properties style:font-name="ArialMT" fo:font-size="14pt" fo:language="en" fo:country="PT" style:font-name-asian="Times New Roman1" style:font-size-asian="14pt" style:language-asian="en" style:country-asian="GB" style:font-name-complex="Times New Roman1" style:font-size-complex="14pt"/>
    </style:style>
    <style:style style:name="T20" style:family="text">
      <style:text-properties style:font-name="ArialMT" fo:font-size="14pt" fo:language="en" fo:country="PT" style:font-name-asian="Times New Roman1" style:font-size-asian="14pt" style:language-asian="en" style:country-asian="GB" style:font-name-complex="Courier New2" style:font-size-complex="14pt"/>
    </style:style>
    <style:style style:name="T21" style:family="text">
      <style:text-properties style:font-name="ArialMT" fo:font-size="11pt" style:font-size-asian="11pt" style:font-size-complex="11pt"/>
    </style:style>
    <style:style style:name="T22" style:family="text">
      <style:text-properties style:font-name="ArialMT" fo:font-size="11pt" officeooo:rsid="000e1f5a" style:font-size-asian="11pt" style:font-size-complex="11pt"/>
    </style:style>
    <style:style style:name="T23" style:family="text">
      <style:text-properties style:font-name="ArialMT" fo:font-size="11pt" fo:font-style="italic" style:font-size-asian="11pt" style:font-style-asian="italic" style:font-size-complex="11pt" style:font-style-complex="italic"/>
    </style:style>
    <style:style style:name="T24" style:family="text">
      <style:text-properties style:font-name="Times New Roman" fo:font-size="12pt" fo:language="en" fo:country="PT" style:font-name-asian="Times New Roman1" style:font-size-asian="12pt" style:language-asian="en" style:country-asian="GB" style:font-name-complex="Times New Roman1" style:font-size-complex="12pt"/>
    </style:style>
    <style:style style:name="T25" style:family="text">
      <style:text-properties style:font-name="Times New Roman" fo:font-size="12pt" style:font-name-asian="Times New Roman1" style:font-size-asian="12pt" style:language-asian="pt" style:country-asian="PT" style:font-name-complex="Times New Roman1" style:font-size-complex="12pt"/>
    </style:style>
    <style:style style:name="T26" style:family="text">
      <style:text-properties style:font-name="Times New Roman" fo:font-size="12pt" fo:language="en" fo:country="US" fo:font-style="italic" style:font-name-asian="Times New Roman1" style:font-size-asian="12pt" style:language-asian="pt" style:country-asian="PT" style:font-style-asian="italic" style:font-name-complex="Times New Roman1" style:font-size-complex="12pt" style:font-style-complex="italic"/>
    </style:style>
    <style:style style:name="T27"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28" style:family="text">
      <style:text-properties fo:color="#000000" loext:opacity="100%" style:font-name="Arial" fo:font-size="16pt" style:font-size-asian="16pt" style:font-name-complex="Arial2" style:font-size-complex="16pt"/>
    </style:style>
    <style:style style:name="T29" style:family="text">
      <style:text-properties fo:color="#000000" loext:opacity="100%" style:font-name="Arial" fo:font-style="italic" style:font-style-asian="italic" style:font-name-complex="Arial2" style:font-style-complex="italic"/>
    </style:style>
    <style:style style:name="T30" style:family="text">
      <style:text-properties fo:color="#000000" loext:opacity="100%" style:font-name="Arial" fo:font-style="italic" fo:font-weight="bold" style:font-name-asian="Times New Roman1" style:language-asian="pt" style:country-asian="PT" style:font-style-asian="italic" style:font-weight-asian="bold" style:font-name-complex="Arial2" style:font-style-complex="italic" style:font-weight-complex="bold"/>
    </style:style>
    <style:style style:name="T31" style:family="text">
      <style:text-properties fo:color="#000000" loext:opacity="100%" style:font-name="Arial" fo:font-style="italic" style:font-name-asian="Times New Roman1" style:language-asian="pt" style:country-asian="PT" style:font-style-asian="italic" style:font-name-complex="Arial2" style:font-style-complex="italic"/>
    </style:style>
    <style:style style:name="T32" style:family="text">
      <style:text-properties fo:color="#000000" loext:opacity="100%" style:font-name="Arial" fo:font-style="italic" style:font-name-asian="Times New Roman1" style:language-asian="pt" style:country-asian="PT" style:font-style-asian="italic" style:font-name-complex="Arial2" style:font-style-complex="italic"/>
    </style:style>
    <style:style style:name="T33" style:family="text">
      <style:text-properties fo:color="#000000" loext:opacity="100%" style:font-name="Arial" fo:font-style="italic" officeooo:rsid="000e1f5a" style:font-name-asian="Times New Roman1" style:language-asian="pt" style:country-asian="PT" style:font-style-asian="italic" style:font-name-complex="Arial2" style:font-style-complex="italic"/>
    </style:style>
    <style:style style:name="T34" style:family="text">
      <style:text-properties fo:color="#000000" loext:opacity="100%" style:font-name="Arial" fo:font-weight="bold" style:font-name-asian="Times New Roman1" style:language-asian="pt" style:country-asian="PT" style:font-weight-asian="bold" style:font-name-complex="Arial2" style:font-weight-complex="bold"/>
    </style:style>
    <style:style style:name="T35" style:family="text">
      <style:text-properties fo:color="#000000" loext:opacity="100%" style:font-name="Arial" fo:font-weight="bold" style:font-name-asian="Times New Roman1" style:language-asian="pt" style:country-asian="PT" style:font-weight-asian="bold" style:font-name-complex="Arial2" style:font-weight-complex="bold"/>
    </style:style>
    <style:style style:name="T36" style:family="text">
      <style:text-properties fo:color="#000000" loext:opacity="100%" style:font-name="Arial" style:font-name-asian="Times New Roman1" style:language-asian="pt" style:country-asian="PT" style:font-name-complex="Arial2"/>
    </style:style>
    <style:style style:name="T37" style:family="text">
      <style:text-properties fo:color="#000000" loext:opacity="100%" style:font-name="Arial" style:font-name-asian="Times New Roman1" style:language-asian="pt" style:country-asian="PT" style:font-name-complex="Arial2"/>
    </style:style>
    <style:style style:name="T38" style:family="text">
      <style:text-properties fo:color="#000000" loext:opacity="100%" style:font-name="Arial" fo:font-size="11pt" style:font-size-asian="11pt" style:font-name-complex="Arial2" style:font-size-complex="11pt"/>
    </style:style>
    <style:style style:name="T39" style:family="text">
      <style:text-properties fo:color="#000000" loext:opacity="100%" style:font-name="Arial" fo:font-size="11pt" officeooo:rsid="000e1f5a" style:font-size-asian="11pt" style:font-name-complex="Arial2" style:font-size-complex="11pt"/>
    </style:style>
    <style:style style:name="T40" style:family="text">
      <style:text-properties fo:color="#000000" loext:opacity="100%" style:font-name="Arial" fo:font-size="11pt" fo:font-style="italic" style:font-size-asian="11pt" style:font-style-asian="italic" style:font-name-complex="Arial2" style:font-size-complex="11pt" style:font-style-complex="italic"/>
    </style:style>
    <style:style style:name="T41" style:family="text">
      <style:text-properties fo:color="#000000" loext:opacity="100%" style:font-name="Arial" fo:font-size="11pt" fo:language="en" fo:country="US" fo:font-style="italic" style:font-size-asian="11pt" style:font-style-asian="italic" style:font-name-complex="Arial2" style:font-size-complex="11pt" style:font-style-complex="italic"/>
    </style:style>
    <style:style style:name="T42" style:family="text">
      <style:text-properties fo:color="#000000" loext:opacity="100%" style:font-name="Arial" fo:font-size="11pt" fo:language="en" fo:country="US" style:font-size-asian="11pt" style:font-name-complex="Arial2" style:font-size-complex="11pt"/>
    </style:style>
    <style:style style:name="T43" style:family="text">
      <style:text-properties fo:color="#000000" loext:opacity="100%" style:font-name="Arial" fo:font-size="11pt" fo:font-weight="bold" style:font-size-asian="11pt" style:font-weight-asian="bold" style:font-name-complex="Arial2" style:font-size-complex="11pt" style:font-weight-complex="bold"/>
    </style:style>
    <style:style style:name="T44" style:family="text">
      <style:text-properties fo:color="#000000" loext:opacity="100%" style:font-name="Arial" fo:font-size="15pt" style:font-size-asian="15pt" style:font-name-complex="Arial2" style:font-size-complex="15pt"/>
    </style:style>
    <style:style style:name="T45" style:family="text">
      <style:text-properties fo:color="#000000" loext:opacity="100%" style:font-name="Arial" fo:font-size="15pt" fo:font-weight="bold" style:font-size-asian="15pt" style:font-weight-asian="bold" style:font-name-complex="Arial2" style:font-size-complex="15pt" style:font-weight-complex="bold"/>
    </style:style>
    <style:style style:name="T46" style:family="text">
      <style:text-properties fo:color="#000000" loext:opacity="100%" style:font-name="Arial" fo:font-size="15pt" fo:font-weight="bold" officeooo:rsid="000f91c9" style:font-size-asian="15pt" style:font-weight-asian="bold" style:font-name-complex="Arial2" style:font-size-complex="15pt" style:font-weight-complex="bold"/>
    </style:style>
    <style:style style:name="T47" style:family="text">
      <style:text-properties fo:color="#000000" loext:opacity="100%" style:font-name="Arial" fo:font-size="15pt" fo:font-style="italic" fo:font-weight="bold" style:font-size-asian="15pt" style:font-style-asian="italic" style:font-weight-asian="bold" style:font-name-complex="Arial2" style:font-size-complex="15pt" style:font-style-complex="italic" style:font-weight-complex="bold"/>
    </style:style>
    <style:style style:name="T48" style:family="text">
      <style:text-properties fo:color="#000000" loext:opacity="100%" style:font-name="Arial" fo:font-size="10.5pt" fo:font-style="italic" style:font-name-asian="Times New Roman1" style:font-size-asian="10.5pt" style:language-asian="pt" style:country-asian="PT" style:font-style-asian="italic" style:font-name-complex="Arial2" style:font-size-complex="10.5pt" style:font-style-complex="italic"/>
    </style:style>
    <style:style style:name="T49" style:family="text">
      <style:text-properties fo:color="#000000" loext:opacity="100%" style:font-name="Arial" fo:font-size="10.5pt" fo:language="en" fo:country="US" fo:font-style="italic" style:font-name-asian="Times New Roman1" style:font-size-asian="10.5pt" style:language-asian="pt" style:country-asian="PT" style:font-style-asian="italic" style:font-name-complex="Arial2" style:font-size-complex="10.5pt" style:font-style-complex="italic"/>
    </style:style>
    <style:style style:name="T50" style:family="text">
      <style:text-properties fo:color="#000000" loext:opacity="100%" style:font-name="Arial" fo:font-size="14pt" fo:font-weight="bold" style:font-size-asian="14pt" style:font-weight-asian="bold" style:font-name-complex="Arial2" style:font-size-complex="14pt" style:font-weight-complex="bold"/>
    </style:style>
    <style:style style:name="T51" style:family="text">
      <style:text-properties fo:color="#000000" loext:opacity="100%" style:font-name="Arial" fo:language="en" fo:country="US" fo:font-style="italic" style:font-name-asian="Times New Roman1" style:language-asian="pt" style:country-asian="PT" style:font-style-asian="italic" style:font-name-complex="Arial2" style:font-style-complex="italic"/>
    </style:style>
    <style:style style:name="T52" style:family="text">
      <style:text-properties fo:color="#000000" loext:opacity="100%" style:font-name="Arial" fo:language="en" fo:country="US" style:font-name-asian="Times New Roman1" style:language-asian="pt" style:country-asian="PT" style:font-name-complex="Arial2"/>
    </style:style>
    <style:style style:name="T53" style:family="text">
      <style:text-properties fo:color="#000000" loext:opacity="100%" style:font-name="Arial" style:font-name-complex="Arial2"/>
    </style:style>
    <style:style style:name="T54" style:family="text">
      <style:text-properties fo:color="#000000" loext:opacity="100%" style:font-name="Arial" officeooo:rsid="000f91c9" style:font-name-complex="Arial2"/>
    </style:style>
    <style:style style:name="T55" style:family="text">
      <style:text-properties fo:font-size="11pt" style:font-size-asian="11pt" style:font-size-complex="11pt"/>
    </style:style>
    <style:style style:name="T56" style:family="text">
      <style:text-properties officeooo:rsid="000e1f5a"/>
    </style:style>
    <style:style style:name="T57" style:family="text">
      <style:text-properties fo:font-weight="bold" style:font-weight-asian="bold" style:font-weight-complex="bold"/>
    </style:style>
    <style:style style:name="T5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1335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8" draw:name="Picture 1" text:anchor-type="char" svg:x="-0.8709in" svg:y="-0.8693in" svg:width="2.8957in" svg:height="0.9547in" draw:z-index="3"><draw:image xlink:href="Pictures/1000000100000280000000D3CDAA02D902129DD3.png" xlink:type="simple" xlink:show="embed" xlink:actuate="onLoad" draw:mime-type="image/png"/><svg:desc>A black sign with white text

Description automatically generated</svg:desc></draw:frame></text:p>
      <text:p text:style-name="Standard"/>
      <text:p text:style-name="Standard"/>
      <text:p text:style-name="Standard"/>
      <text:p text:style-name="P31" loext:marker-style-name="T1"><text:span text:style-name="T1">Rede de Computadores</text:span><text:span text:style-name="T1"/></text:p>
      <text:p text:style-name="P31" loext:marker-style-name="T2"><text:span text:style-name="T2">(2º Trabalho Laboratorial)</text:span><text:span text:style-name="T2"/></text:p>
      <text:p text:style-name="P32" loext:marker-style-name="T3"/>
      <text:p text:style-name="P32" loext:marker-style-name="T3"/>
      <text:p text:style-name="P31" loext:marker-style-name="T3"><text:span text:style-name="T4">Redes de Computadores </text:span><text:span text:style-name="T17">·</text:span><text:span text:style-name="T5"> </text:span><text:span text:style-name="T3">L.EIC025</text:span></text:p>
      <text:p text:style-name="P31" loext:marker-style-name="T3"><text:span text:style-name="T3">2023/2024</text:span><text:span text:style-name="T18"> </text:span><text:span text:style-name="T17">·</text:span><text:span text:style-name="T18"> </text:span><text:span text:style-name="T3">1º Semestre</text:span></text:p>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1" loext:marker-style-name="T4"><text:span text:style-name="T3">Turma: </text:span><text:span text:style-name="T6">3LEIC08</text:span></text:p>
      <text:p text:style-name="P34" loext:marker-style-name="T20"><text:span text:style-name="T19">João Correia <text:s text:c="11"/><text:tab/><text:tab/><text:tab/><text:tab/><text:tab/></text:span><text:span text:style-name="T20">up202005015</text:span></text:p>
      <text:p text:style-name="P35" loext:marker-style-name="T24"><text:span text:style-name="T19">Miguel Charchalis </text:span><text:span text:style-name="T24"><text:tab/><text:tab/><text:tab/><text:tab/><text:tab/> <text:s text:c="10"/></text:span><text:span text:style-name="T20">up201506074</text:span></text:p>
      <text:p text:style-name="Standard"/>
      <text:list text:style-name="WWNum2">
        <text:list-item>
          <text:h text:style-name="P2" text:outline-level="1" loext:marker-style-name="T28"><text:span text:style-name="T28">Sumário</text:span><text:span text:style-name="T28"/></text:h>
        </text:list-item>
      </text:list>
      <text:p text:style-name="P19" loext:marker-style-name="T21"><text:span text:style-name="T21">No âmbito da unidade curricular Redes de Computadores, realizou-se o 2º projeto que nos foi proposto. O projeto “Computer Networks” está dividido em duas partes. A primeira parte consiste em desenvolver uma aplicação de </text:span><text:span text:style-name="T23">download</text:span><text:span text:style-name="T21"> de um ficheiro utilizando o protocolo FTP (</text:span><text:span text:style-name="T29">File Transfer Protocol</text:span><text:span text:style-name="T21">). A segunda parte consiste em realizar várias experiências para configurar uma rede.</text:span></text:p>
      <text:p text:style-name="P19" loext:marker-style-name="T21"><text:span text:style-name="T21">O projeto foi realizado com sucesso, pois criamos uma aplicação capaz de transferir ficheiros e configuramos a rede </text:span><text:span text:style-name="T22">como foi proposto</text:span><text:span text:style-name="T21">.</text:span></text:p>
      <text:p text:style-name="P20" loext:marker-style-name="T21"/>
      <text:list xml:id="list192047254084714" text:continue-numbering="true" text:style-name="WWNum2">
        <text:list-item>
          <text:h text:style-name="P3" text:outline-level="1" loext:marker-style-name="T7"><text:span text:style-name="T7">Introdução</text:span><text:span text:style-name="T7"/></text:h>
        </text:list-item>
      </text:list>
      <text:h text:style-name="P4" text:outline-level="1" loext:marker-style-name="T9"><text:span text:style-name="T9">Através deste relatório, pretendemos apresentar de maneira organizada o funcionamento da aplicação de </text:span><text:span text:style-name="T11">download</text:span><text:span text:style-name="T9"> de um ficheiro, quando fornecido um URL no formato </text:span><text:span text:style-name="Internet_20_link"><text:span text:style-name="T9">ftp://[&lt;user&gt;:&lt;password&gt;@]&lt;host&gt;/&lt;url-path</text:span></text:span><text:span text:style-name="T9">&gt; e também o funcionamento da configuração da rede de computadores capaz de se conectar à internet e testar a aplicação. Organizamos o relatório com a seguinte estrutura:</text:span></text:h>
      <text:list text:style-name="WWNum7">
        <text:list-item>
          <text:p text:style-name="P9" loext:marker-style-name="T36"><text:span text:style-name="T34">Aplicação de </text:span><text:span text:style-name="T30">download</text:span></text:p>
        </text:list-item>
      </text:list>
      <text:p text:style-name="P36" loext:marker-style-name="T36"><text:span text:style-name="T36"><text:s/>Descrição da arquitetura e do caso de sucesso.</text:span><text:span text:style-name="T36"/></text:p>
      <text:list xml:id="list2011894196" text:style-name="WWNum5">
        <text:list-item>
          <text:p text:style-name="P10" loext:marker-style-name="T36"><text:span text:style-name="T34">Configuração e análise da rede</text:span><text:span text:style-name="T34"/></text:p>
        </text:list-item>
      </text:list>
      <text:p text:style-name="P11" loext:marker-style-name="T36"><text:span text:style-name="T36">Descrição da arquitetura da rede, objetivos, principais comandos de configuração e análise dos principais </text:span><text:span text:style-name="T31">logs</text:span><text:span text:style-name="T36"> capturados para as seis experiências realizadas.</text:span></text:p>
      <text:list text:style-name="WWNum6">
        <text:list-item>
          <text:p text:style-name="P16" loext:marker-style-name="T36"><text:span text:style-name="T36">Experiência 1 – Configurar uma rede IP</text:span><text:span text:style-name="T36"/></text:p>
        </text:list-item>
        <text:list-item>
          <text:p text:style-name="P16" loext:marker-style-name="T36"><text:span text:style-name="T36">Experiência 2 – Implementação de duas </text:span><text:span text:style-name="T31">bridges</text:span><text:span text:style-name="T36"> no </text:span><text:span text:style-name="T31">switch</text:span></text:p>
        </text:list-item>
        <text:list-item>
          <text:p text:style-name="P16" loext:marker-style-name="T36"><text:span text:style-name="T36">Experiência 3 – Configuração de um </text:span><text:span text:style-name="T31">router</text:span><text:span text:style-name="T36"> em Linux</text:span></text:p>
        </text:list-item>
        <text:list-item>
          <text:p text:style-name="P16" loext:marker-style-name="T36"><text:span text:style-name="T36">Experiência 4 – Configurar um </text:span><text:span text:style-name="T31">router</text:span><text:span text:style-name="T36"> comercial e implementar NAT</text:span></text:p>
        </text:list-item>
        <text:list-item>
          <text:p text:style-name="P16" loext:marker-style-name="T36"><text:span text:style-name="T36">Experiência 5 – DNS</text:span><text:span text:style-name="T36"/></text:p>
        </text:list-item>
        <text:list-item>
          <text:p text:style-name="P16" loext:marker-style-name="T36"><text:span text:style-name="T36">Experiência 6 – Conexões TCP</text:span><text:span text:style-name="T36"/></text:p>
        </text:list-item>
      </text:list>
      <text:list text:continue-list="list2011894196" text:style-name="WWNum5">
        <text:list-item>
          <text:p text:style-name="P12" loext:marker-style-name="T36"><text:span text:style-name="T34">Conclusões</text:span><text:span text:style-name="T36"><text:line-break/>Síntese da informação apresentada nas secções anteriores e reflexão sobre os objetivos de aprendizagem alcançados.</text:span></text:p>
        </text:list-item>
      </text:list>
      <text:list xml:id="list192047179565047" text:continue-list="list192047254084714" text:style-name="WWNum2">
        <text:list-item>
          <text:h text:style-name="P1" text:outline-level="1" loext:marker-style-name="T7"><text:span text:style-name="T7">Aplicação </text:span><text:span text:style-name="T8">download</text:span></text:h>
        </text:list-item>
      </text:list>
      <text:h text:style-name="P5" text:outline-level="1" loext:marker-style-name="T7"><text:span text:style-name="T14">3.1- Arquitetura</text:span><text:span text:style-name="T7"/></text:h>
      <text:p text:style-name="P37" loext:marker-style-name="T36"><text:span text:style-name="T36">Para realizar a execução da aplicação, foram consultadas as normas RFC959 (funcionamento e arquitetura do protocolo FTP) e RFC1738 (tratamento do URL).</text:span><text:span text:style-name="T36"/></text:p>
      <text:p text:style-name="P37" loext:marker-style-name="T15"><text:span text:style-name="T15">Inicialmente compila-se o programa e passamos-lhe como argumento o seguinte link:</text:span><text:span text:style-name="T15"/></text:p>
      <text:list xml:id="list2935952117" text:style-name="WWNum9">
        <text:list-item>
          <text:p text:style-name="P21" loext:marker-style-name="T55"><text:span text:style-name="T38">ftp://[&lt;user&gt;:&lt;password&gt;@]&lt;host&gt;/&lt;url-path&gt;</text:span><text:span text:style-name="T38"/></text:p>
        </text:list-item>
      </text:list>
      <text:p text:style-name="P37" loext:marker-style-name="T15"><text:soft-page-break/><text:span text:style-name="T15">A aplicação faz um </text:span><text:span text:style-name="T16">parse </text:span><text:span text:style-name="T15">do URL, armazenando cada componente num array. Se o </text:span><text:span text:style-name="T16">user</text:span><text:span text:style-name="T15"> e a </text:span><text:span text:style-name="T16">password</text:span><text:span text:style-name="T15"> não forem especificados, são assumidos como “anonymous” e “password”.</text:span></text:p>
      <text:p text:style-name="P37" loext:marker-style-name="T15"><text:span text:style-name="T15">Depois de interpretados os dados do URL, é feita a comunicação com o servidor através de um </text:span><text:span text:style-name="T16">socket</text:span><text:span text:style-name="T15"> TCP. O passo seguinte é o programa tentar aceder ao servidor com as credenciais indicadas e, depois o login, o programa solicita ao servidor a resposta em modo passivo (PASV), pois o servidor é quem vai escolher para que porta o ficheiro será enviado. Outro </text:span><text:span text:style-name="T16">socket</text:span><text:span text:style-name="T15"> é aberto para a transferência do ficheiro. Após concluída, os dois </text:span><text:span text:style-name="T16">sockets</text:span><text:span text:style-name="T15"> são fechados.</text:span></text:p>
      <text:h text:style-name="P5" text:outline-level="1" loext:marker-style-name="T14"><text:span text:style-name="T14">3.2- Caso de sucesso</text:span><text:span text:style-name="T14"/></text:h>
      <text:h text:style-name="P5" text:outline-level="1" loext:marker-style-name="T9"><text:span text:style-name="T9">Para testar a aplicação, realizamos os testes com dois ficheiros distintos,</text:span><text:span text:style-name="T10"> </text:span><text:span text:style-name="T9">pic1.jpg e timestamp.txt, com e sem autenticação no servidor (Figura 3.2a e 3.2b).</text:span></text:h>
      <text:h text:style-name="P5" text:outline-level="1" loext:marker-style-name="T14"><draw:frame draw:style-name="fr7" draw:name="Image2" text:anchor-type="as-char" svg:width="6.2681in" svg:height="2.3638in" draw:z-index="1"><draw:image xlink:href="Pictures/10000001000006120000024B79CCEAA8FD46353B.png" xlink:type="simple" xlink:show="embed" xlink:actuate="onLoad" draw:mime-type="image/png"/></draw:frame></text:h>
      <text:h text:style-name="P5" text:outline-level="1" loext:marker-style-name="T9"><text:span text:style-name="T9">Figura 3.2a - </text:span><text:span text:style-name="T11">Transferência do ficheiro pic1.jpg (340603 bytes) com autenticação</text:span></text:h>
      <text:h text:style-name="P5" text:outline-level="1" loext:marker-style-name="T14"><draw:frame draw:style-name="fr7" draw:name="Picture 2" text:anchor-type="as-char" svg:width="6.2681in" svg:height="3.461in" draw:z-index="2"><draw:image xlink:href="Pictures/10000001000005EA000003449D382B8D17B33B4F.png" xlink:type="simple" xlink:show="embed" xlink:actuate="onLoad" draw:mime-type="image/png"/><svg:desc>A computer screen with white text

Description automatically generated</svg:desc></draw:frame></text:h>
      <text:h text:style-name="P5" text:outline-level="1" loext:marker-style-name="T11"><text:soft-page-break/><text:span text:style-name="T9">Figura 3.2b - </text:span><text:span text:style-name="T11">Transferência do ficheiro timestamp.txt (11 bytes) sem autenticação</text:span></text:h>
      <text:h text:style-name="P6" text:outline-level="1" loext:marker-style-name="T9"/>
      <text:list text:continue-list="list192047179565047" text:style-name="WWNum2">
        <text:list-item>
          <text:h text:style-name="P7" text:outline-level="1" loext:marker-style-name="T7"><draw:frame draw:style-name="fr5" draw:name="Picture 6" text:anchor-type="char" svg:x="5.411in" svg:y="-0.2472in" svg:width="1.3909in" svg:height="1.5346in" draw:z-index="4"><draw:image xlink:href="Pictures/100000010000007E0000008B7B527FA914FD71A6.png" xlink:type="simple" xlink:show="embed" xlink:actuate="onLoad" draw:mime-type="image/png"/><svg:desc>Diagram

Description automatically generated</svg:desc></draw:frame><text:span text:style-name="T7">Configuração e análise de redes</text:span><text:span text:style-name="T7"/></text:h>
        </text:list-item>
      </text:list>
      <text:h text:style-name="P8" text:outline-level="1" loext:marker-style-name="T44"><text:span text:style-name="T44">4.1- Experiência 1 - Configurar uma rede IP</text:span><text:span text:style-name="T44"/></text:h>
      <text:p text:style-name="P23" loext:marker-style-name="T38"><text:span text:style-name="T38">O objetivo desta experiência é configurar duas máquinas, Tux53 e Tux54, <text:tab/><text:tab/> <text:s text:c="8"/>sendo necessário a atribuição de um endereço IP para cada uma delas.</text:span><text:span text:style-name="T38"/></text:p>
      <text:p text:style-name="P23" loext:marker-style-name="T38"><text:span text:style-name="T38">Foi ligado a entrada E0 de cada Tux ao switch e com o comando ifconfig, configurou-se os IPs de cada um. O Tux 53 foi configurado com o IP 172.16.50.1/24, enquanto o Tux 54 foi configurado com o IP 172.16.50.254/24.</text:span><text:span text:style-name="T38"/></text:p>
      <text:p text:style-name="P24" loext:marker-style-name="T12"><text:span text:style-name="T38">O protocolo ARP (</text:span><text:span text:style-name="T40">Address Resolution Protocol</text:span><text:span text:style-name="T38">) é um procedimento para mapear endereços de IP dinâmicos para um endereço de máquina físico numa rede local. Assim, associa o endereço IP com o endereço MAC. Depois de apagar a tabela ARP dos computadores, o protocolo ARP foi executado.</text:span></text:p>
      <text:p text:style-name="P23" loext:marker-style-name="T38"><text:span text:style-name="T38">O protocolo ICMP (</text:span><text:span text:style-name="T40">Internet Control Message Protocol</text:span><text:span text:style-name="T38">) é utilizado para trocar mensagens de controlo, indicando sucesso ou erros que possam existir durante a comunicação com outro endereço. </text:span></text:p>
      <text:p text:style-name="P23" loext:marker-style-name="T38"><text:span text:style-name="T38">Principais comandos:</text:span><text:span text:style-name="T38"/></text:p>
      <text:p text:style-name="P23" loext:marker-style-name="T38"><text:span text:style-name="T38">Configuração de ip:</text:span><text:span text:style-name="T38"/></text:p>
      <text:list text:style-name="WWNum10">
        <text:list-item>
          <text:p text:style-name="P13" loext:marker-style-name="T48"><text:span text:style-name="T48">ifconfig ethX </text:span><text:span text:style-name="T48"/></text:p>
        </text:list-item>
        <text:list-item>
          <text:p text:style-name="P13" loext:marker-style-name="T48"><text:span text:style-name="T48">ifconfig ethX &lt;ip-do-computador&gt;</text:span><text:span text:style-name="T48"/></text:p>
        </text:list-item>
      </text:list>
      <text:p text:style-name="P37" loext:marker-style-name="T15"><text:span text:style-name="T15">Verificar conexão entre os dois Tuxs:</text:span><text:span text:style-name="T15"/></text:p>
      <text:list text:style-name="WWNum11">
        <text:list-item>
          <text:p text:style-name="P14" loext:marker-style-name="T48"><text:span text:style-name="T48">ping &lt;ip-do-computador-que-pretende-verifcar&gt; </text:span><text:span text:style-name="T48"/></text:p>
        </text:list-item>
      </text:list>
      <text:p text:style-name="P33" loext:marker-style-name="T15"/>
      <text:p text:style-name="P33" loext:marker-style-name="T15"/>
      <text:p text:style-name="P33" loext:marker-style-name="T15"/>
      <text:p text:style-name="P33" loext:marker-style-name="T15"/>
      <text:p text:style-name="P33" loext:marker-style-name="T15"/>
      <text:p text:style-name="P33" loext:marker-style-name="T15"/>
      <text:p text:style-name="P33" loext:marker-style-name="T15"/>
      <text:p text:style-name="P33" loext:marker-style-name="T15"/>
      <text:p text:style-name="P25" loext:marker-style-name="T38"><draw:frame draw:style-name="fr6" draw:name="Picture 8" text:anchor-type="char" svg:x="2.0689in" svg:y="0.5181in" svg:width="1.9272in" svg:height="1.1917in" draw:z-index="5"><draw:image xlink:href="Pictures/10000001000000DC00000088B2265EE126727404.png" xlink:type="simple" xlink:show="embed" xlink:actuate="onLoad" draw:mime-type="image/png"/><svg:desc>Diagram

Description automatically generated</svg:desc></draw:frame><text:soft-page-break/><text:span text:style-name="T45">4.2-</text:span><text:span text:style-name="T44"> </text:span><text:span text:style-name="T45">Experiência 2 – Implementação de duas </text:span><text:span text:style-name="T47">bridges</text:span><text:span text:style-name="T45"> no </text:span><text:span text:style-name="T47">switch</text:span></text:p>
      <text:p text:style-name="P26" loext:marker-style-name="T38"><text:span text:style-name="T38">O objetivo desta experiência é criar duas </text:span><text:span text:style-name="T40">bridges </text:span><text:span text:style-name="T38">no </text:span><text:span text:style-name="T40">switch</text:span><text:span text:style-name="T38">, e perceber a conectividade entre os computadores e como estas influenciam a troca de informação entre as máquinas.</text:span></text:p>
      <text:p text:style-name="P28" loext:marker-style-name="T38"/>
      <text:p text:style-name="P26" loext:marker-style-name="T38"><text:span text:style-name="T38">Inicialmente repetiu-se o processo de configuração de IP para o Tux 52 (172.16.51.1).</text:span><text:span text:style-name="T38"/></text:p>
      <text:p text:style-name="P25" loext:marker-style-name="T38"><text:span text:style-name="T38">Para configurarmos as </text:span><text:span text:style-name="T40">bridges</text:span><text:span text:style-name="T38">,</text:span><text:span text:style-name="T40"> </text:span><text:span text:style-name="T38">criamos a bridge50 e bridge51 através do </text:span><text:span text:style-name="T40">GTkterm</text:span><text:span text:style-name="T38">, e associamos à primeira o tux53 e o tux54 e à segunda o tux52, tendo assim a arquitetura pretendida. Depois, podemos verificar a conectividade entre os computadores, fazendo um </text:span><text:span text:style-name="T40">ping</text:span><text:span text:style-name="T38"> do tux</text:span><text:span text:style-name="T39">5</text:span><text:span text:style-name="T38">3 até ao tux</text:span><text:span text:style-name="T39">5</text:span><text:span text:style-name="T38">4, que foi executado com sucesso, pois estes encontram-se na mesma sub-rede. Fazendo um </text:span><text:span text:style-name="T40">ping</text:span><text:span text:style-name="T38"> do tux53 até ao tux52, não obtivemos resposta, pois não existe nenhuma rota entre as duas </text:span><text:span text:style-name="T40">bridges</text:span><text:span text:style-name="T38">. </text:span></text:p>
      <text:p text:style-name="P23" loext:marker-style-name="T38"><text:span text:style-name="T38">Principais comandos:</text:span><text:span text:style-name="T38"/></text:p>
      <text:p text:style-name="P25" loext:marker-style-name="T40"><text:span text:style-name="T38">Para criar as </text:span><text:span text:style-name="T40">bridges</text:span><text:span text:style-name="T38">, no </text:span><text:span text:style-name="T40">GTkTerm:</text:span></text:p>
      <text:list text:continue-list="list2935952117" text:style-name="WWNum9">
        <text:list-item>
          <text:p text:style-name="P22" loext:marker-style-name="T42"><text:span text:style-name="T41">/interface bridge add name=bridgeY0</text:span><text:span text:style-name="T41"/></text:p>
        </text:list-item>
      </text:list>
      <text:p text:style-name="P25" loext:marker-style-name="T55"><text:span text:style-name="T38">Depois para adicionar as correspondentes </text:span><text:span text:style-name="T40">ports</text:span><text:span text:style-name="T38"> às </text:span><text:span text:style-name="T40">bridges</text:span><text:span text:style-name="T38">:</text:span></text:p>
      <text:list text:continue-numbering="true" text:style-name="WWNum9">
        <text:list-item>
          <text:p text:style-name="P22" loext:marker-style-name="T41"><text:span text:style-name="T41">/interface bridge port add bridge=bridgeY0 interface=etherX</text:span><text:span text:style-name="T41"/></text:p>
        </text:list-item>
      </text:list>
      <text:p text:style-name="P25" loext:marker-style-name="T38"><text:span text:style-name="T38">Por fim utilizamos o comando </text:span><text:span text:style-name="T40">ping</text:span><text:span text:style-name="T38"> pela mesma lógica referida na Experiência 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 loext:marker-style-name="T45"><draw:frame draw:style-name="fr5" draw:name="Picture 9" text:anchor-type="char" svg:x="4.6571in" svg:y="0.339in" svg:width="2.0909in" svg:height="1.2736in" draw:z-index="6"><draw:image xlink:href="Pictures/10000001000000DC00000086E32B014A66AF53D6.png" xlink:type="simple" xlink:show="embed" xlink:actuate="onLoad" draw:mime-type="image/png"/><svg:desc>A diagram of a bridge

Description automatically generated</svg:desc></draw:frame><text:soft-page-break/><text:span text:style-name="T45">4.3-</text:span><text:span text:style-name="T44"> </text:span><text:span text:style-name="T45">Experiência 3 – Configuração de um </text:span><text:span text:style-name="T47">router</text:span><text:span text:style-name="T45"> em Linux</text:span></text:p>
      <text:p text:style-name="P27" loext:marker-style-name="T38"><text:span text:style-name="T38">O propósito desta experiência é ajustar o tux54 de forma a que</text:span></text:p>
      <text:p text:style-name="P27" loext:marker-style-name="T38"><text:span text:style-name="T38">funcione como um router, facilitando a comunicação entre o tux53</text:span></text:p>
      <text:p text:style-name="P27" loext:marker-style-name="T38"><text:span text:style-name="T38">e o tux52 através das bridges configuradas na experiência</text:span></text:p>
      <text:p text:style-name="P27" loext:marker-style-name="T38"><text:span text:style-name="T38">anterior. Para possibilitar a comunicação, é necessário</text:span></text:p>
      <text:p text:style-name="P27" loext:marker-style-name="T38"><text:span text:style-name="T38">configurar os endereços IP das portas e interfaces Ethernet dos</text:span></text:p>
      <text:p text:style-name="P27" loext:marker-style-name="T38"><text:span text:style-name="T38">computadores, bem como as rotas que serão utilizadas.</text:span></text:p>
      <text:p text:style-name="P28" loext:marker-style-name="T38"/>
      <text:p text:style-name="P48" loext:marker-style-name="T55"><text:span text:style-name="T38">Para estabelecer uma conexão entre o tux53 e o tux52, é necessário adicionar uma rota ao tux53 para acessar os endereços 172.16.51.0/24 a partir do IP 172.16.50.254. Dessa forma, quando o tux53 deseja enviar um ping para a bridge51, ele utilizará o router, que neste caso é o tux54 (172.16.50.254), como gateway. Além disso, é necessário adicionar uma rota ao tux52 para acessar os endereços 172.16.50.0/24 a partir do IP 172.16.51.253.</text:span></text:p>
      <text:p text:style-name="P48" loext:marker-style-name="T55"><text:span text:style-name="T38"/></text:p>
      <text:p text:style-name="P50">Essas rotas podem ser visualizadas na tabela de encaminhamento usando o comando <text:span text:style-name="T57">route -n</text:span>. A tabela de encaminhamento é um conjunto de entradas onde cada entrada contém informações do tipo Destino-Gateway-Interface. O destino é o IP do computador de destino, o gateway é o IP do computador para o qual a mensagem será enviada e a interface é a placa de rede usada para enviar a mensagem.</text:p>
      <text:p text:style-name="P50">Assim, com essas rotas definidas, torna-se possível realizar ping, a partir do tux53, para todas as interfaces dos outros computadores.</text:p>
      <text:p text:style-name="P25" loext:marker-style-name="T55"><text:span text:style-name="T38"/></text:p>
      <text:p text:style-name="P48" loext:marker-style-name="T55"><text:span text:style-name="T38">Dessa forma, ao realizar um ping do tux53 para o tux52, são registrados os seguintes pacotes ARP. Inicialmente, é identificado um pacote que solicita o envio do endereço MAC associado ao IP 172.16.50.254 para o endereço 172.16.50.1. Isso ocorre porque o tux53 está identificando a interface do tux54, que encaminha o pacote enviado pelo ping para o tux52. O endereço MAC de resposta corresponde à interface eth0 do tux54.</text:span></text:p>
      <text:p text:style-name="P50">Em seguida, na mesma interface, é observado o pacote ARP que requisita o envio do endereço MAC de 172.16.50.1 para 172.16.50.254. Essa solicitação ocorre porque o tux54 precisa do endereço MAC da interface do tux53 para encaminhar a resposta do tux52 ao ping. Na eth1 do tux54, há uma interação em que o tux54 pergunta pelo endereço MAC do tux52 para encaminhar o pacote de ping, e o tux52 fornece o endereço MAC de eth0 do tux52.</text:p>
      <text:p text:style-name="P50">Posteriormente, o tux52 solicita o endereço MAC de eth1 do tux54 para enviar a resposta do ping, e o tux54 responde com o endereço MAC de eth1 do tux54. Essa troca de mensagens ARP ocorre sempre que uma mensagem é enviada de uma máquina para outra, quando os endereços MAC não são conhecidos.</text:p>
      <text:p text:style-name="P25" loext:marker-style-name="T55"><text:span text:style-name="T38"/></text:p>
      <text:p text:style-name="P26"/>
      <text:p text:style-name="P26" loext:marker-style-name="T12"><text:span text:style-name="T12">Ao analisar os pacotes ICMP, podemos identificar pacotes do tipo request e reply, indicando que todas as rotas estão devidamente configuradas. Caso não estivessem configuradas, veríamos pacotes ICMP do tipo Host Unreachable. Os endereços IP de destino nos pacotes </text:span><text:soft-page-break/><text:span text:style-name="T12">ICMP sempre correspondem aos IPs de nossa máquina, enquanto os endereços IP associados aos pacotes ICMP de origem representam os IPs pelos quais os pacotes viajam para atingir o destino desejado. O endereço MAC de destino nos pacotes ICMP está associado à interface virtual, ao passo que o endereço MAC de origem nos pacotes ICMP é o endereço MAC da interface virtual do computador host.</text:span></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9" loext:marker-style-name="T12"/>
      <text:p text:style-name="Standard" loext:marker-style-name="T45"><draw:frame draw:style-name="fr4" draw:name="Picture 18" text:anchor-type="char" svg:x="1.0681in" svg:y="0.6563in" svg:width="3.6484in" svg:height="1.4665in" draw:z-index="7"><draw:image xlink:href="Pictures/10000001000001B6000000AB36852E16CB0C1DB5.png" xlink:type="simple" xlink:show="embed" xlink:actuate="onLoad" draw:mime-type="image/png"/><svg:desc>Diagram

Description automatically generated</svg:desc></draw:frame><text:soft-page-break/><text:span text:style-name="T45">4.4-</text:span><text:span text:style-name="T44"> </text:span><text:span text:style-name="T45">Experiência 4 – Configurar um </text:span><text:span text:style-name="T47">router</text:span><text:span text:style-name="T45"> comercial e implementar NAT</text:span></text:p>
      <text:p text:style-name="P25" loext:marker-style-name="T38"><text:span text:style-name="T38">O objetivo desta experiência é estabelecer uma ligação com a rede dos laboratórios e implementar rotas num </text:span><text:span text:style-name="T40">router</text:span><text:span text:style-name="T38"> comercial, configurando-lhe funcionalidade NAT para garantir a conexão entre as máquinas e a internet.</text:span></text:p>
      <text:p text:style-name="P25" loext:marker-style-name="T38"><text:span text:style-name="T38">Inicialmente, é necessário configurar o router. Para realizar esta configuração, iniciamos a sessão no router por meio do GTkTerm e conectamos o cabo S0 de qualquer Tux à entrada de configuração do router. Essa abordagem permite o acesso ao router via GTkTerm, possibilitando a configuração do IP do router e das rotas usando o comando </text:span><text:span text:style-name="T43">ip route</text:span><text:span text:style-name="T38">.</text:span></text:p>
      <text:p text:style-name="P25" loext:marker-style-name="T38"><text:span text:style-name="T38">Existem dois cenários possíveis para possibilitar o acesso à internet a partir do computador. No primeiro cenário, uma rota é configurada entre as duas máquinas, e a informação segue essa rota. No segundo cenário, caso essa rota não exista, os pacotes são enviados pela rota padrão, e a máquina para a qual a rota padrão está definida encaminha os pacotes para o destino. Na experiência em questão, como a rota do Tux52 para o Tux53 foi apagada, os pacotes foram redirecionados para o router e, posteriormente, encaminhados para o Tux54.</text:span><text:span text:style-name="T38"/></text:p>
      <text:p text:style-name="P25" loext:marker-style-name="T38"><text:span text:style-name="T38">O NAT (</text:span><text:span text:style-name="T40">Network Address Translation</text:span><text:span text:style-name="T38">) é um mecanismo implementado em routers que substitui os endereços IP locais nos pacotes por um endereço IP público, permitindo estabelecer conexões para fora da rede. Dessa forma, o router que implementa o NAT assume a responsabilidade de encaminhar todos os pacotes para os endereços corretos, seja dentro ou fora da rede local.</text:span></text:p>
      <text:p text:style-name="P50">Nesta experiência, considerando que o Tux53 deseja enviar um pacote para um endereço em uma rede pública, o pacote é inicialmente enviado para o router. Este router modifica o endereço de origem do pacote para o seu endereço externo, garantindo assim a privacidade e a segurança do remetente. O pacote é então enviado, e, ao receber uma resposta, o router a encaminha de volta para o Tux53, ajustando o destinatário do pacote para o seu próprio endereço.</text:p>
      <text:p text:style-name="P50">Esse processo possibilita a comunicação entre a rede privada local e a rede pública, enquanto mantém a segurança e a privacidade dos dispositivos locais ao ocultar <text:span text:style-name="T56">os </text:span>seus endereços IP privados na rede externa.</text:p>
      <text:p text:style-name="P25" loext:marker-style-name="T38"><text:span text:style-name="T38"/></text:p>
      <text:p text:style-name="P25" loext:marker-style-name="T38"><text:span text:style-name="T38"/></text:p>
      <text:p text:style-name="P23" loext:marker-style-name="T50"><text:soft-page-break/><text:span text:style-name="T50">4.4.2- Principais comandos</text:span><text:span text:style-name="T50"/></text:p>
      <text:p text:style-name="P41" loext:marker-style-name="T25"><text:span text:style-name="T36">Configurar </text:span><text:span text:style-name="T31">ip </text:span><text:span text:style-name="T36">e as rotas do </text:span><text:span text:style-name="T31">router</text:span><text:span text:style-name="T36">:</text:span></text:p>
      <text:list text:continue-numbering="true" text:style-name="WWNum9">
        <text:list-item>
          <text:p text:style-name="P17" loext:marker-style-name="T26"><text:span text:style-name="T49">/ip address add address=172.16.1.Y9/24 interface=ether1</text:span></text:p>
        </text:list-item>
        <text:list-item>
          <text:p text:style-name="P17" loext:marker-style-name="T26"><text:span text:style-name="T49">/ip address add address=172.16.Y1.254/24 interface=ether2</text:span></text:p>
        </text:list-item>
        <text:list-item>
          <text:p text:style-name="P17" loext:marker-style-name="T26"><text:span text:style-name="T49">/ip route add dst-address=172.16.Y0.0/24 gateway=172.16.Y1.253</text:span></text:p>
        </text:list-item>
        <text:list-item>
          <text:p text:style-name="P17" loext:marker-style-name="T26"><text:span text:style-name="T49">/ip route add address=0.0.0.0/0 gateway=172.16.2.254</text:span></text:p>
        </text:list-item>
      </text:list>
      <text:p text:style-name="P42" loext:marker-style-name="T27"/>
      <text:p text:style-name="P41" loext:marker-style-name="T25"><text:span text:style-name="T36">No tuxy2 definir RC como </text:span><text:span text:style-name="T31">default</text:span><text:span text:style-name="T36"> </text:span><text:span text:style-name="T31">router</text:span><text:span text:style-name="T36">:</text:span></text:p>
      <text:list text:style-name="WWNum12">
        <text:list-item>
          <text:p text:style-name="P18" loext:marker-style-name="T26"><text:span text:style-name="T51">route add default gw 172.16.y1.254</text:span></text:p>
        </text:list-item>
      </text:list>
      <text:p text:style-name="P42" loext:marker-style-name="T27"/>
      <text:p text:style-name="P41" loext:marker-style-name="T25"><text:span text:style-name="T36">No tuxy3 definir tuxy4 como </text:span><text:span text:style-name="T31">default</text:span><text:span text:style-name="T36"> </text:span><text:span text:style-name="T31">router</text:span><text:span text:style-name="T36">:</text:span></text:p>
      <text:list text:continue-numbering="true" text:style-name="WWNum12">
        <text:list-item>
          <text:p text:style-name="P18" loext:marker-style-name="T26"><text:span text:style-name="T51">route add default gw 172.16.y0.254</text:span></text:p>
        </text:list-item>
      </text:list>
      <text:p text:style-name="P42" loext:marker-style-name="T27"/>
      <text:p text:style-name="P41" loext:marker-style-name="T25"><text:span text:style-name="T36">No tuxy4 definir RC como </text:span><text:span text:style-name="T31">default</text:span><text:span text:style-name="T36"> </text:span><text:span text:style-name="T31">router</text:span><text:span text:style-name="T36">:</text:span></text:p>
      <text:list text:continue-numbering="true" text:style-name="WWNum12">
        <text:list-item>
          <text:p text:style-name="P18" loext:marker-style-name="T26"><text:span text:style-name="T51">route add default gw 172.16.y1.254</text:span></text:p>
        </text:list-item>
      </text:list>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Standard" loext:marker-style-name="T45"><draw:frame draw:style-name="fr3" draw:name="Picture 19" text:anchor-type="char" svg:y="0.4299in" svg:width="3.5165in" svg:height="1.3634in" draw:z-index="8"><draw:image xlink:href="Pictures/10000001000001D8000000B7C98209A3A5336FAC.png" xlink:type="simple" xlink:show="embed" xlink:actuate="onLoad" draw:mime-type="image/png"/><svg:desc>Diagram, schematic

Description automatically generated</svg:desc></draw:frame><text:soft-page-break/><text:span text:style-name="T45">4.5-</text:span><text:span text:style-name="T44"> </text:span><text:span text:style-name="T45">Experiência 5 – DNS</text:span></text:p>
      <text:p text:style-name="P38" loext:marker-style-name="T53"><text:span text:style-name="T53">O objetivo desta experiência é configurar o DNS responsável por traduzir endereços URL em endereços IP.</text:span><text:span text:style-name="T53"/></text:p>
      <text:p text:style-name="P39" loext:marker-style-name="T25"><text:span text:style-name="T36">O serviço DNS é configurado no ficheiro </text:span><text:span text:style-name="T31">resolv.conf </text:span><text:span text:style-name="T33">de cada Tux </text:span><text:span text:style-name="T36">bastando adicionar no ficheiro:</text:span></text:p>
      <text:list text:style-name="WWNum13">
        <text:list-item>
          <text:p text:style-name="P15" loext:marker-style-name="T27"><text:span text:style-name="T52">search netlab.fe.up.pt</text:span></text:p>
        </text:list-item>
        <text:list-item>
          <text:p text:style-name="P15" loext:marker-style-name="T27"><text:span text:style-name="T52">nameserver 172.16.1.1</text:span></text:p>
        </text:list-item>
      </text:list>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4" loext:marker-style-name="T45"><text:span text:style-name="T45"/></text:p>
      <text:p text:style-name="P44" loext:marker-style-name="T45"><text:soft-page-break/><text:span text:style-name="T45">4.</text:span><text:span text:style-name="T46">6</text:span><text:span text:style-name="T45">-</text:span><text:span text:style-name="T44"> </text:span><text:span text:style-name="T45">Experiência </text:span><text:span text:style-name="T46">6</text:span><text:span text:style-name="T45"> – </text:span><text:span text:style-name="T46">Conexões TCP</text:span></text:p>
      <text:p text:style-name="P44" loext:marker-style-name="T45"><draw:frame draw:style-name="fr1" draw:name="Image1" text:anchor-type="char" svg:x="0.2193in" svg:y="-0.0244in" svg:width="5.4992in" svg:height="1.6701in" draw:z-index="0"><draw:image xlink:href="Pictures/1000000000000247000000B1CF706E3EC70F4A63.png" xlink:type="simple" xlink:show="embed" xlink:actuate="onLoad" draw:mime-type="image/png"/></draw:frame><text:span text:style-name="T46"/></text:p>
      <text:p text:style-name="P44" loext:marker-style-name="T45"><text:span text:style-name="T46"/></text:p>
      <text:p text:style-name="P40" loext:marker-style-name="T53"><text:span text:style-name="T53"><text:s/></text:span></text:p>
      <text:p text:style-name="P40" loext:marker-style-name="T53"><text:span text:style-name="T53"/></text:p>
      <text:p text:style-name="P40" loext:marker-style-name="T53"><text:span text:style-name="T53"/></text:p>
      <text:p text:style-name="P40" loext:marker-style-name="T53"><text:span text:style-name="T54">O </text:span><text:span text:style-name="T53">objetivo desta experiência é </text:span><text:span text:style-name="T54">compilar e correr o programa download que fizemos.</text:span></text:p>
      <text:p text:style-name="P45" loext:marker-style-name="T53"><text:span text:style-name="T53">Ao executar o codigo não foi possível extrair os ficheiros usando a rede que configuramos. Depois de revermos a configuração da rede e consultarmos com o professor do Laboratório, chegamos à conclusão que o problema não era da nossa configuração da rede mas sim com algo fora da nossa responsabilidade.</text:span></text:p>
      <text:p text:style-name="P40" loext:marker-style-name="T53"><text:span text:style-name="T54">Testamos o programa download noutro computador e conseguimos extrair os dois ficheiros com sucesso.</text:span></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51"><text:soft-page-break/><text:span text:style-name="T54">5 - </text:span><text:span text:style-name="T53">Conclusão</text:span></text:p>
      <text:p text:style-name="P49" loext:marker-style-name="T53"><text:span text:style-name="T54"/></text:p>
      <text:p text:style-name="P49" loext:marker-style-name="T53"><text:span text:style-name="T54">Podemos concluir que os objetivos de desenvolver uma aplicação que permite o download de um arquivo por meio de conexões utilizando os protocolos FTP e TCP, juntamente com a configuração de uma rede IP, foram alcançados com sucesso. Desta forma, foi possível compreender o funcionamento do router e do switch, assim como diversas técnicas (NAT, DNS, etc.), protocolos (ICMP, ARP, etc.) e estruturas de dados utilizados para realizar a comunicação entre as máquinas, como as tabelas ARP e as forwarding tables.</text:span></text:p>
      <text:p text:style-name="P50">Além disso, a análise dos vários logs das experiências capturados nas diferentes máquinas Tux por meio do Wireshark proporcionou um entendimento profundo de como as diferentes camadas de comunicação interagem dentro de uma rede de computadores. Em resumo, podemos afirmar com convicção que adquirimos conhecimentos de extrema relevância ao longo do desenvolvimento deste projeto.</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6 – Anexo – Aplicação download</text:p>
      <text:p text:style-name="P47"><draw:frame draw:style-name="fr2" draw:name="Image3" text:anchor-type="char" svg:width="6.2681in" svg:height="3.7252in" draw:z-index="9"><draw:image xlink:href="Pictures/1000000000000306000001CC722C6B9074043111.png" xlink:type="simple" xlink:show="embed" xlink:actuate="onLoad" draw:mime-type="image/png"/></draw:frame><draw:frame draw:style-name="fr1" draw:name="Image4" text:anchor-type="char" svg:x="0.0098in" svg:y="3.9709in" svg:width="6.2681in" svg:height="4.9453in" draw:z-index="10"><draw:image xlink:href="Pictures/100000000000034700000296D5A30477BF632774.png" xlink:type="simple" xlink:show="embed" xlink:actuate="onLoad" draw:mime-type="image/png"/></draw:frame></text:p>
      <text:p text:style-name="P47"/>
      <text:p text:style-name="P47"><draw:frame draw:style-name="fr1" draw:name="Image5" text:anchor-type="char" svg:x="0.0102in" svg:y="0.0102in" svg:width="6.2681in" svg:height="4.7346in" draw:z-index="11"><draw:image xlink:href="Pictures/10000000000002E40000022F67F0B4CA13A827E3.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6" text:anchor-type="char" svg:x="0.3583in" svg:y="0.0008in" svg:width="5.5311in" svg:height="5.8957in" draw:z-index="12"><draw:image xlink:href="Pictures/100000000000021300000236B5B2D2823A19740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7" text:anchor-type="char" svg:x="-0.0098in" svg:y="0.0236in" svg:width="6.2681in" svg:height="4.8874in" draw:z-index="13"><draw:image xlink:href="Pictures/10000000000002FB00000253F1F3744B6524C103.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draw:frame draw:style-name="fr1" draw:name="Image8" text:anchor-type="char" svg:x="0.3374in" svg:y="0.0209in" svg:width="5.6354in" svg:height="6.7189in" draw:z-index="14"><draw:image xlink:href="Pictures/100000000000021F0000028C698A371BF3C54F45.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PT"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PT"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fo:language="pt" fo:country="PT" style:letter-kerning="false"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ne_20_number" style:display-name="line number" style:family="text" style:parent-style-name="Default_20_Paragraph_20_Font"/>
    <style:style style:name="Footer_20_Char" style:display-name="Footer Char" style:family="text" style:parent-style-name="Default_20_Paragraph_20_Font" loext:linked-style-name="Footer">
      <style:text-properties fo:font-size="11pt" fo:language="pt" fo:country="PT" style:letter-kerning="false" style:font-size-asian="11pt" style:font-size-complex="11pt"/>
    </style:style>
    <style:style style:name="page_20_number" style:display-name="page number" style:family="text" style:parent-style-name="Default_20_Paragraph_20_Fon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language="pt" fo:country="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000000" loext:opacity="100%"/>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457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457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457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457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457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457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457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4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453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0453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5453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0453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545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0453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5453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045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946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446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946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page number"><text:span text:style-name="page_20_number"><text:page-number text:select-page="current">1</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ão Pedro Carvalho Correia</meta:initial-creator>
    <meta:editing-cycles>3</meta:editing-cycles>
    <meta:creation-date>2023-12-22T10:15:00</meta:creation-date>
    <dc:date>2023-12-22T19:20:31.968062753</dc:date>
    <meta:editing-duration>PT3H25M44S</meta:editing-duration>
    <meta:generator>LibreOffice/7.5.6.2$Linux_X86_64 LibreOffice_project/50$Build-2</meta:generator>
    <meta:document-statistic meta:table-count="0" meta:image-count="15" meta:object-count="0" meta:page-count="17" meta:paragraph-count="107" meta:word-count="2015" meta:character-count="12774" meta:non-whitespace-character-count="10829"/>
    <meta:user-defined meta:name="AppVersion">16.0000</meta:user-defined>
    <meta:template xlink:type="simple" xlink:actuate="onRequest" xlink:title="Normal.dotm" xlink:href=""/>
  </office:meta>
</office:document-meta>
</file>